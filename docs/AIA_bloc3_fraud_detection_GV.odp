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4D000002598E37C6A36B2213FB.png" manifest:media-type="image/png"/>
  <manifest:file-entry manifest:full-path="Pictures/10000201000004390000029A221A34FAC46F728A.png" manifest:media-type="image/png"/>
  <manifest:file-entry manifest:full-path="Pictures/100002010000071C0000030C0A0FB817DB03731F.png" manifest:media-type="image/png"/>
  <manifest:file-entry manifest:full-path="Pictures/TablePreview1.svm" manifest:media-type=""/>
  <manifest:file-entry manifest:full-path="Pictures/100002010000008D000000609DFC021226D1E32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41b4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opacity="2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a64d79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741b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5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741b47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029cm" style:use-optimal-column-width="false"/>
    </style:style>
    <style:style style:name="co2" style:family="table-column">
      <style:table-column-properties style:column-width="3.519cm" style:use-optimal-column-width="false"/>
    </style:style>
    <style:style style:name="co3" style:family="table-column">
      <style:table-column-properties style:column-width="3.521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32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ff" draw:opacity="21%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solid" draw:fill-color="#741b47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30pt" fo:letter-spacing="normal" fo:font-style="normal" style:text-underline-style="none" fo:font-weight="normal" style:font-name-asian="Roboto Light" style:font-size-asian="30pt" style:font-style-asian="normal" style:font-weight-asian="normal" style:font-name-complex="Roboto Ligh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Calibri" fo:font-size="19pt" fo:letter-spacing="normal" fo:font-style="normal" style:text-underline-style="none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■">
        <style:list-level-properties text:space-before="2.841cm" text:min-label-width="0.969cm"/>
        <style:text-properties style:font-name="Calibri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969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○">
        <style:list-level-properties text:space-before="1.571cm" text:min-label-width="0.969cm"/>
        <style:text-properties style:font-name="Calibri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499cm" svg:height="3.047cm" svg:x="1cm" svg:y="3.811cm">
          <text:p text:style-name="P1"><text:span text:style-name="T1">Bloc 3 : Concevoir et mettre en oeuvre des pipelines de données (pour l'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5.53cm" svg:height="2.751cm" svg:x="1cm" svg:y="0.536cm">
          <text:p text:style-name="P3"><text:span text:style-name="T1">Jedha - Data Science Lead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23.499cm" svg:height="1.185cm" svg:x="1cm" svg:y="1.922cm">
          <text:p text:style-name="P3"><text:span text:style-name="T3"><text:s/></text:span><text:span text:style-name="T3">Certification AIA (Architecte 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4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58;p13" draw:style-name="gr3" draw:text-style-name="P4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;p13" draw:style-name="gr4" draw:text-style-name="P5" draw:layer="layout" svg:width="23.689cm" svg:height="1.591cm" svg:x="0.81cm" svg:y="8.626cm">
          <text:p text:style-name="P1"><text:span text:style-name="T4">Fraud detection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2" draw:layer="layout" svg:width="23.689cm" svg:height="0.716cm" svg:x="0.81cm" svg:y="13.178cm">
          <text:p text:style-name="P3"><text:span text:style-name="T5">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5" draw:text-style-name="P2" draw:layer="layout" svg:width="4.298cm" svg:height="1.197cm" svg:x="18.02cm" svg:y="11.166cm">
          <text:p text:style-name="P3"><text:a xlink:href="https://github.com/gviel/jedha-aia-03-frauddetection" xlink:type="simple">Dépôt Github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66;p14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8" draw:text-style-name="P7" draw:layer="layout" svg:width="23.484cm" svg:height="1.999cm" svg:x="1.015cm" svg:y="0.007cm">
          <text:p text:style-name="P3"><text:span text:style-name="T6">Contexte et problém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9" draw:text-style-name="P2" draw:layer="layout" svg:width="23.484cm" svg:height="1.495cm" svg:x="1.015cm" svg:y="2.09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5" draw:text-style-name="P2" draw:layer="layout" svg:width="23.832cm" svg:height="11.037cm" svg:x="0.994cm" svg:y="2.105cm">
          <text:list text:style-name="L2">
            <text:list-item>
              <text:p text:style-name="P8"><text:span text:style-name="T7">Context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La fraude : enjeu majeur pour les institutions financières</text:span></text:p>
                </text:list-item>
                <text:list-item>
                  <text:p text:style-name="P8"><text:span text:style-name="T8">En 2019, la BCE estimait les transactions frauduleuses par carte en UE à plus d’1 milliard d’euros</text:span></text:p>
                </text:list-item>
                <text:list-item>
                  <text:p text:style-name="P8"><text:span text:style-name="T8">L’IA permet une détection précise des fraudes → cas d’usage phare en Data Science</text:span><text:span text:style-name="T7"><text:line-break/></text:span><text:span text:style-name="T7"/></text:p>
                </text:list-item>
              </text:list>
            </text:list-item>
            <text:list-item>
              <text:p text:style-name="P8"><text:span text:style-name="T7">Problème</text:span></text:p>
              <text:list>
                <text:list-item>
                  <text:p text:style-name="P8"><text:span text:style-name="T8">Les algorithmes de détection sont performants, mais leur déploiement en production reste complexe</text:span></text:p>
                </text:list-item>
                <text:list-item>
                  <text:p text:style-name="P8"><text:span text:style-name="T8">Défi clé : Détecter les fraudes en temps réel et réagir instantanémen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3ebf453f15a_0_10:notes" draw:style-name="gr6" draw:layer="layout" svg:width="16.932cm" svg:height="9.524cm" svg:x="1.059cm" svg:y="1.905cm" draw:page-number="2" presentation:class="page"/>
          <draw:frame draw:name="Google Shape;64;g3ebf453f15a_0_1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15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8" draw:text-style-name="P7" draw:layer="layout" svg:width="23.484cm" svg:height="1.999cm" svg:x="1.015cm" svg:y="0.007cm">
          <text:p text:style-name="P3"><text:span text:style-name="T6">Objectifs et périmètre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5" draw:text-style-name="P2" draw:layer="layout" svg:width="23.642cm" svg:height="9.671cm" svg:x="0.936cm" svg:y="2.795cm">
          <text:list text:style-name="L2">
            <text:list-item>
              <text:p text:style-name="P8"><text:span text:style-name="T7">Objectif principal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8">Notification immédiate à chaque détection de fraude : alerte simple</text:span></text:p>
                </text:list-item>
                <text:list-item>
                  <text:p text:style-name="P8"><text:span text:style-name="T8">Rapport quotidien : Vérifier tous les paiements et fraudes de la veille chaque matin</text:span><text:span text:style-name="T8"><text:line-break/></text:span><text:span text:style-name="T8"/></text:p>
                </text:list-item>
              </text:list>
            </text:list-item>
          </text:list>
          <text:list text:style-name="L5">
            <text:list-item>
              <text:p text:style-name="P8"><text:span text:style-name="T7">Périmètre</text:span></text:p>
              <text:list>
                <text:list-item>
                  <text:p text:style-name="P8"><text:span text:style-name="T8">Cible : Transactions par carte (focus fraude)</text:span></text:p>
                </text:list-item>
                <text:list-item>
                  <text:p text:style-name="P8"><text:span text:style-name="T8">Fonctionnalité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8">Détection en temps réel + système d’alerte</text:span></text:p>
                    </text:list-item>
                    <text:list-item>
                      <text:p text:style-name="P8"><text:span text:style-name="T8">Automatisation d’un rapport journalier (paiements + fraude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3ee0dac29e3_0_3:notes" draw:style-name="gr6" draw:layer="layout" svg:width="16.932cm" svg:height="9.524cm" svg:x="1.059cm" svg:y="1.905cm" draw:page-number="3" presentation:class="page"/>
          <draw:frame draw:name="Google Shape;74;g3ee0dac29e3_0_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5;p16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11" draw:text-style-name="P2" draw:layer="layout" svg:width="23.484cm" svg:height="2.783cm" svg:x="0.841cm" svg:y="5.654cm">
          <text:p text:style-name="P1"><text:span text:style-name="T10">Phase 1 : Entraînement des modè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3ee0dac29e3_0_12:notes" draw:style-name="gr6" draw:layer="layout" svg:width="16.932cm" svg:height="9.524cm" svg:x="1.059cm" svg:y="1.905cm" draw:page-number="4" presentation:class="page"/>
          <draw:frame draw:name="Google Shape;83;g3ee0dac29e3_0_1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3;p17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8" draw:text-style-name="P7" draw:layer="layout" svg:width="23.484cm" svg:height="1.999cm" svg:x="1.015cm" svg:y="0.007cm">
          <text:p text:style-name="P3"><text:span text:style-name="T6">Entraînement des modèles - détection de fraude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5" draw:text-style-name="P2" draw:layer="layout" svg:width="24.321cm" svg:height="10.43cm" svg:x="0.6cm" svg:y="2.422cm">
          <text:list text:style-name="L7">
            <text:list-item>
              <text:p text:style-name="P8"><text:span text:style-name="T11">2145 fraudes / ~555k <text:s/>transactions → 0.386%</text:span></text:p>
            </text:list-item>
            <text:list-item>
              <text:p text:style-name="P8"><text:span text:style-name="T11">Fraude : classe ultra-minoritaire → dataset très déséquilibré</text:span></text:p>
            </text:list-item>
            <text:list-item>
              <text:p text:style-name="P8"><text:span text:style-name="T11">Accuracy et ROC-AUC sont trompeurs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11">même si leurs valeurs peuvent être bonnes, les nombreux vrais négatifs dilue le reste</text:span><text:span text:style-name="T11"><text:line-break/></text:span><text:span text:style-name="T11"/></text:p>
                </text:list-item>
              </text:list>
            </text:list-item>
          </text:list>
          <text:p text:style-name="P3"><text:span text:style-name="T11">Donc</text:span></text:p>
          <text:list text:continue-numbering="true" text:style-name="L5">
            <text:list-item>
              <text:p text:style-name="P3"><text:span text:style-name="T11">Utilisation du PR-AUC pour départager les modèles dans un premier temps (pas de dilution avec les négatifs)</text:span></text:p>
            </text:list-item>
            <text:list-item>
              <text:p text:style-name="P3"><text:span text:style-name="T11">Ensuite arbitrage avec f1-score, precision et recall selon le compromis souhaité entre fausses alertes et fraudes manquées</text:span></text:p>
            </text:list-item>
            <text:list-item>
              <text:p text:style-name="P3"><text:span text:style-name="T11">Utilisation méthodes SMOTE ou under-sampling : peu convainca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3f0fa6fd511_0_44:notes" draw:style-name="gr6" draw:layer="layout" svg:width="16.932cm" svg:height="9.524cm" svg:x="1.059cm" svg:y="1.905cm" draw:page-number="5" presentation:class="page"/>
          <draw:frame draw:name="Google Shape;91;g3f0fa6fd511_0_44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pourquoi PR-AUC ?</text:span></text:p>
              <text:list text:style-name="L10">
                <text:list-item>
                  <text:p text:style-name="P3"><text:span text:style-name="T12">La fraude est une classe très minoritaire (quelques % du dataset)</text:span></text:p>
                </text:list-item>
                <text:list-item>
                  <text:p text:style-name="P3"><text:span text:style-name="T12">dans ce contexte, l'accuracy ( (TP+TN)/Total et le ROC-AUC (courbe recall=TP/(TP+FN) vs taux de faux positifs FP/(TN+FN) ) sont trompeurs, car ils sont dominés par les vrais négatifs (TN), très nombreux qui dilue le reste.</text:span></text:p>
                </text:list-item>
                <text:list-item>
                  <text:p text:style-name="P3"><text:span text:style-name="T12">On le voit sur nos résultats : XGBoost a un ROC-AUC=0.997 quasi-parfait mais précision=TP/(TP+FP)=0.25 seulement au seuil par défaut — 3/4 alertes sont de fausses alertes (FP).</text:span></text:p>
                </text:list-item>
                <text:list-item>
                  <text:p text:style-name="P3"><text:span text:style-name="T12">Le PR-AUC (aire sous la courbe precision-recall) se concentre uniquement sur la classe positive (la fraude) et résume la performance du modèle sur tous les seuils de décision possibles, pas un seul. </text:span></text:p>
                </text:list-item>
              </text:list>
              <text:list text:style-name="L11">
                <text:list-item>
                  <text:list>
                    <text:list-item>
                      <text:p text:style-name="P3"><text:span text:style-name="T12">essentiel ici car F1/precision/recall dépendent fortement du seuil choisi</text:span></text:p>
                    </text:list-item>
                    <text:list-item>
                      <text:p text:style-name="P3"><text:span text:style-name="T12">le tableau le montre bien : XGBoost et LightGBM ont un PR-AUC proche (0.84 vs 0.86), mais des F1 très différents (0.40 vs 0.77) au même seuil de 0.5, simplement parce que leurs courbes precision-recall ont des formes différentes.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En résumé : PR-AUC sert à comparer et sélectionner les modèles (indépendant du seuil, focalisé sur la classe rare) ; F1/precision/recall serviront ensuite à choisir le seuil opérationnel une fois le modèle retenu, selon le compromis souhaité entre fausses alertes et fraudes manquées.</text:span></text:p>
            </draw:text-box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02;p18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8" draw:text-style-name="P7" draw:layer="layout" svg:width="23.484cm" svg:height="1.999cm" svg:x="1.015cm" svg:y="0.007cm">
          <text:p text:style-name="P3"><text:span text:style-name="T6">Entraînement des modèles - détection de fraude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draw:style-name="standard" draw:layer="layout" svg:width="20.106cm" svg:height="7.936cm" svg:x="2.305cm" svg:y="3.775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Modèle</text:span></text:p>
              </table:table-cell>
              <table:table-cell>
                <text:p text:style-name="P1"><text:span text:style-name="T13">PR-AUC</text:span></text:p>
              </table:table-cell>
              <table:table-cell>
                <text:p text:style-name="P1"><text:span text:style-name="T13">F1-score</text:span></text:p>
              </table:table-cell>
              <table:table-cell>
                <text:p text:style-name="P1"><text:span text:style-name="T13">Précision</text:span></text:p>
              </table:table-cell>
              <table:table-cell>
                <text:p text:style-name="P1"><text:span text:style-name="T13">Recal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LightGBM (more trees)</text:span></text:p>
              </table:table-cell>
              <table:table-cell>
                <text:p text:style-name="P1"><text:span text:style-name="T13">0.888</text:span></text:p>
              </table:table-cell>
              <table:table-cell>
                <text:p text:style-name="P1"><text:span text:style-name="T13">0.80</text:span></text:p>
              </table:table-cell>
              <table:table-cell>
                <text:p text:style-name="P1"><text:span text:style-name="T13">0.76</text:span></text:p>
              </table:table-cell>
              <table:table-cell>
                <text:p text:style-name="P1"><text:span text:style-name="T13">0.8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LightGBM (baseline)</text:span></text:p>
              </table:table-cell>
              <table:table-cell>
                <text:p text:style-name="P1"><text:span text:style-name="T14">0.864</text:span></text:p>
              </table:table-cell>
              <table:table-cell>
                <text:p text:style-name="P1"><text:span text:style-name="T14">0.77</text:span></text:p>
              </table:table-cell>
              <table:table-cell>
                <text:p text:style-name="P1"><text:span text:style-name="T14">0.70</text:span></text:p>
              </table:table-cell>
              <table:table-cell>
                <text:p text:style-name="P1"><text:span text:style-name="T14">0.8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XGBoost</text:span></text:p>
              </table:table-cell>
              <table:table-cell>
                <text:p text:style-name="P1"><text:span text:style-name="T14">0.844</text:span></text:p>
              </table:table-cell>
              <table:table-cell>
                <text:p text:style-name="P1"><text:span text:style-name="T14">0.40</text:span></text:p>
              </table:table-cell>
              <table:table-cell>
                <text:p text:style-name="P1"><text:span text:style-name="T14">0.25</text:span></text:p>
              </table:table-cell>
              <table:table-cell>
                <text:p text:style-name="P1"><text:span text:style-name="T14">0.9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RandomForest</text:span></text:p>
              </table:table-cell>
              <table:table-cell>
                <text:p text:style-name="P1"><text:span text:style-name="T14">0.720</text:span></text:p>
              </table:table-cell>
              <table:table-cell>
                <text:p text:style-name="P1"><text:span text:style-name="T14">0.38</text:span></text:p>
              </table:table-cell>
              <table:table-cell>
                <text:p text:style-name="P1"><text:span text:style-name="T14">0.24</text:span></text:p>
              </table:table-cell>
              <table:table-cell>
                <text:p text:style-name="P1"><text:span text:style-name="T14">0.8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LogisticRegression</text:span></text:p>
              </table:table-cell>
              <table:table-cell>
                <text:p text:style-name="P1"><text:span text:style-name="T14">0.202</text:span></text:p>
              </table:table-cell>
              <table:table-cell>
                <text:p text:style-name="P1"><text:span text:style-name="T14">0.08</text:span></text:p>
              </table:table-cell>
              <table:table-cell>
                <text:p text:style-name="P1"><text:span text:style-name="T14">0.04</text:span></text:p>
              </table:table-cell>
              <table:table-cell>
                <text:p text:style-name="P1"><text:span text:style-name="T14">0.8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99;g3f0fa6fd511_0_90:notes" draw:style-name="gr6" draw:layer="layout" svg:width="16.932cm" svg:height="9.524cm" svg:x="1.059cm" svg:y="1.905cm" draw:page-number="6" presentation:class="page"/>
          <draw:frame draw:name="Google Shape;100;g3f0fa6fd511_0_9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pourquoi PR-AUC ?</text:span></text:p>
              <text:list text:style-name="L10">
                <text:list-item>
                  <text:p text:style-name="P3"><text:span text:style-name="T12">La fraude est une classe très minoritaire (quelques % du dataset)</text:span></text:p>
                </text:list-item>
                <text:list-item>
                  <text:p text:style-name="P3"><text:span text:style-name="T12">dans ce contexte, l'accuracy ( (TP+TN)/Total et le ROC-AUC (courbe recall=TP/(TP+FN) vs taux de faux positifs FP/(TN+FN) ) sont trompeurs, car ils sont dominés par les vrais négatifs (TN), très nombreux qui dilue le reste.</text:span></text:p>
                </text:list-item>
                <text:list-item>
                  <text:p text:style-name="P3"><text:span text:style-name="T12">On le voit sur nos résultats : XGBoost a un ROC-AUC=0.997 quasi-parfait mais précision=TP/(TP+FP)=0.25 seulement au seuil par défaut — 3/4 alertes sont de fausses alertes (FP).</text:span></text:p>
                </text:list-item>
                <text:list-item>
                  <text:p text:style-name="P3"><text:span text:style-name="T12">Le PR-AUC (aire sous la courbe precision-recall) se concentre uniquement sur la classe positive (la fraude) et résume la performance du modèle sur tous les seuils de décision possibles, pas un seul. </text:span></text:p>
                </text:list-item>
              </text:list>
              <text:list text:style-name="L11">
                <text:list-item>
                  <text:list>
                    <text:list-item>
                      <text:p text:style-name="P3"><text:span text:style-name="T12">essentiel ici car F1/precision/recall dépendent fortement du seuil choisi</text:span></text:p>
                    </text:list-item>
                    <text:list-item>
                      <text:p text:style-name="P3"><text:span text:style-name="T12">le tableau le montre bien : XGBoost et LightGBM ont un PR-AUC proche (0.84 vs 0.86), mais des F1 très différents (0.40 vs 0.77) au même seuil de 0.5, simplement parce que leurs courbes precision-recall ont des formes différentes.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En résumé : PR-AUC sert à comparer et sélectionner les modèles (indépendant du seuil, focalisé sur la classe rare) ; F1/precision/recall serviront ensuite à choisir le seuil opérationnel une fois le modèle retenu, selon le compromis souhaité entre fausses alertes et fraudes manquées.</text:span></text:p>
              <text:p text:style-name="P3"><text:span text:style-name="T12"/></text:p>
            </draw:text-box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11;p19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11" draw:text-style-name="P2" draw:layer="layout" svg:width="23.484cm" svg:height="2.783cm" svg:x="0.841cm" svg:y="5.654cm">
          <text:p text:style-name="P1"><text:span text:style-name="T10">Phase 2 : Mise en place DAGs et Architecture de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3f0fa6fd511_0_60:notes" draw:style-name="gr6" draw:layer="layout" svg:width="16.932cm" svg:height="9.524cm" svg:x="1.059cm" svg:y="1.905cm" draw:page-number="7" presentation:class="page"/>
          <draw:frame draw:name="Google Shape;109;g3f0fa6fd511_0_6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119;p20" draw:style-name="gr7" draw:text-style-name="P7" draw:layer="layout" svg:width="25.254cm" svg:height="1.617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0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0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0" draw:style-name="gr2" draw:text-style-name="P4" draw:layer="layout" svg:width="20.669cm" svg:height="13.016cm" svg:x="0.423cm" svg:y="0.586cm">
          <draw:image xlink:href="Pictures/10000201000004390000029A221A34FAC46F728A.png" xlink:type="simple" xlink:show="embed" xlink:actuate="onLoad">
            <text:p/>
          </draw:image>
        </draw:frame>
        <presentation:notes draw:style-name="dp2">
          <draw:page-thumbnail draw:name="Google Shape;116;g3f0fa6fd511_0_52:notes" draw:style-name="gr6" draw:layer="layout" svg:width="16.932cm" svg:height="9.524cm" svg:x="1.059cm" svg:y="1.905cm" draw:page-number="8" presentation:class="page"/>
          <draw:frame draw:name="Google Shape;117;g3f0fa6fd511_0_52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5">1er DAG ETL et Fraud detection: exécuté toutes les minutes</text:span></text:p>
              <text:list text:style-name="L14">
                <text:list-item>
                  <text:p text:style-name="P3"><text:span text:style-name="T15">extraction de la transaction à partir de l’API JEDHA qui simule l’arrivée de trx</text:span></text:p>
                </text:list-item>
                <text:list-item>
                  <text:p text:style-name="P3"><text:span text:style-name="T15">sauvegarde sur S3 par répertoire date (pour création datalake, mécanisme de reprise etc.) + sauvegarde en bdd posgresql</text:span></text:p>
                </text:list-item>
                <text:list-item>
                  <text:p text:style-name="P3"><text:span text:style-name="T15">puis détection de la fraude par notre API</text:span></text:p>
                </text:list-item>
              </text:list>
              <text:list text:style-name="L15">
                <text:list-item>
                  <text:list>
                    <text:list-item>
                      <text:p text:style-name="P3"><text:span text:style-name="T15">si le score &gt; seuil fixé on envoie un email sinon rien</text:span></text:p>
                    </text:list-item>
                    <text:list-item>
                      <text:p text:style-name="P3"><text:span text:style-name="T15">le bonus ici c’est d’utiliser la trx qui vient d’arriver comme base pour générer un nouvelle trx fictive assez proche et l’ajouter au dataset : cela permet de simuler un dataset glissant et de provoquer un réentrainement</text:span></text:p>
                    </text:list-item>
                  </text:list>
                </text:list-item>
              </text:list>
              <text:p text:style-name="P3"><text:span text:style-name="T12"/></text:p>
              <text:p text:style-name="P3"><text:span text:style-name="T12">2e DAG Train model : déclenché 1x/jour ou selon un taux de modification du dataset</text:span></text:p>
              <text:list text:style-name="L17">
                <text:list-item>
                  <text:p text:style-name="P3"><text:span text:style-name="T12">à l’initialisation s’il n’y a aucun dataset dans le répertoire de travail work/ on y copie le dataset original et on poursuit sur la préparation du dataset</text:span></text:p>
                </text:list-item>
                <text:list-item>
                  <text:p text:style-name="P3"><text:span text:style-name="T12">s’il y a un dataset mais qu’il n’a pas évolué par rapport au dataset original, le DAG s'arrête là</text:span></text:p>
                </text:list-item>
                <text:list-item>
                  <text:p text:style-name="P3"><text:span text:style-name="T12">si le dataset a évolué par rapport au dataset original (par exemple au delà d’un certain seuil) alors on poursuit sur la préparation du dataset</text:span></text:p>
                </text:list-item>
                <text:list-item>
                  <text:p text:style-name="P3"><text:span text:style-name="T12">après une préparation de dataset réussie, on passe à l’entrainement des modèles qui sont ensuite poussés vers MLFlow et taggés</text:span></text:p>
                </text:list-item>
              </text:list>
              <text:p text:style-name="P3"><text:span text:style-name="T12"/></text:p>
              <text:p text:style-name="P3"><text:span text:style-name="T12">3e DAG report : exécuté 1x/j et n’est pas représenté ici car juste une seule tache qui envoie un rapport de toutes les fraudes de la veille</text:span></text:p>
              <text:p text:style-name="P3"><text:span text:style-name="T12"/></text:p>
            </draw:text-box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127;p21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8" draw:text-style-name="P7" draw:layer="layout" svg:width="23.484cm" svg:height="1.999cm" svg:x="1.015cm" svg:y="0.007cm">
          <text:p text:style-name="P3"><text:span text:style-name="T6">Architecture de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1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1" draw:style-name="gr2" draw:text-style-name="P4" draw:layer="layout" svg:width="21.963cm" svg:height="11.989cm" svg:x="2.125cm" svg:y="1.26cm">
          <draw:image xlink:href="Pictures/100002010000044D000002598E37C6A36B2213FB.png" xlink:type="simple" xlink:show="embed" xlink:actuate="onLoad">
            <text:p/>
          </draw:image>
        </draw:frame>
        <presentation:notes draw:style-name="dp2">
          <draw:page-thumbnail draw:name="Google Shape;124;g3f0fa6fd511_0_67:notes" draw:style-name="gr6" draw:layer="layout" svg:width="16.932cm" svg:height="9.524cm" svg:x="1.059cm" svg:y="1.905cm" draw:page-number="9" presentation:class="page"/>
          <draw:frame draw:name="Google Shape;125;g3f0fa6fd511_0_67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5">architecture de test : mis à part la gateway SMTP et l’API JEDHA, tout le reste a été mis dans une stack Docker</text:span></text:p>
            </draw:text-box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36;p22" draw:style-name="gr10" draw:text-style-name="P9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11" draw:text-style-name="P2" draw:layer="layout" svg:width="23.484cm" svg:height="2.783cm" svg:x="0.841cm" svg:y="5.654cm">
          <text:p text:style-name="P1"><text:span text:style-name="T10">Phase 3 : Mise en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2" draw:style-name="gr10" draw:text-style-name="P9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2" draw:style-name="gr12" draw:text-style-name="P9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f0fa6fd511_0_29:notes" draw:style-name="gr6" draw:layer="layout" svg:width="16.932cm" svg:height="9.524cm" svg:x="1.059cm" svg:y="1.905cm" draw:page-number="10" presentation:class="page"/>
          <draw:frame draw:name="Google Shape;134;g3f0fa6fd511_0_2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44;p23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8" draw:text-style-name="P7" draw:layer="layout" svg:width="23.484cm" svg:height="1.999cm" svg:x="1.015cm" svg:y="0.007cm">
          <text:p text:style-name="P3"><text:span text:style-name="T6">Architecture pipeline de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3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3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3" draw:style-name="gr2" draw:text-style-name="P4" draw:layer="layout" svg:width="25.229cm" svg:height="10.812cm" svg:x="0.068cm" svg:y="2.075cm">
          <draw:image xlink:href="Pictures/100002010000071C0000030C0A0FB817DB03731F.png" xlink:type="simple" xlink:show="embed" xlink:actuate="onLoad">
            <text:p/>
          </draw:image>
        </draw:frame>
        <presentation:notes draw:style-name="dp2">
          <draw:page-thumbnail draw:name="Google Shape;141;g3f0fa6fd511_0_20:notes" draw:style-name="gr6" draw:layer="layout" svg:width="16.932cm" svg:height="9.524cm" svg:x="1.059cm" svg:y="1.905cm" draw:page-number="11" presentation:class="page"/>
          <draw:frame draw:name="Google Shape;142;g3f0fa6fd511_0_2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153;p24" draw:style-name="gr7" draw:text-style-name="P7" draw:layer="layout" svg:width="25.402cm" svg:height="1.999cm" svg:x="0cm" svg:y="0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8" draw:text-style-name="P7" draw:layer="layout" svg:width="23.484cm" svg:height="1.999cm" svg:x="1.015cm" svg:y="0.007cm">
          <text:p text:style-name="P3"><text:span text:style-name="T6">Dé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5" draw:text-style-name="P2" draw:layer="layout" svg:width="23.642cm" svg:height="9.671cm" svg:x="0.858cm" svg:y="2.712cm">
          <text:list text:style-name="L2">
            <text:list-item>
              <text:p text:style-name="P8"><text:span text:style-name="T16"><text:a xlink:href="https://jedha-aia-03-frauddetection-vs7adfbiy54amcv5jqy3gc.streamlit.app/" xlink:type="simple">Dashboard (Streamlit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jedha-aia-03-frauddetection.onrender.com/docs" xlink:type="simple">API Fraud Detection (Render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://localhost:8080/dags" xlink:type="simple">Airflow (stack locale docker compose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gviel-mlflow37.hf.space/" xlink:type="simple">MLFlow (Hugging Face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console.neon.tech/app/projects/icy-mouse-37340309/branches/br-cool-thunder-a6dhtxi9/tables" xlink:type="simple">PgSQL DB (Neon)</text:a></text:span><text:span text:style-name="T7"><text:line-break/></text:span><text:span text:style-name="T7"/></text:p>
            </text:list-item>
            <text:list-item>
              <text:p text:style-name="P8"><text:span text:style-name="T16"><text:a xlink:href="https://s3.console.aws.amazon.com/s3/buckets/bucket-fraud-detection-gviel?region=eu-west-3&amp;tab=objects" xlink:type="simple">Bucket</text:a></text:span><text:span text:style-name="T16"><text:a xlink:href="https://s3.console.aws.amazon.com/s3/buckets/bucket-fraud-detection-gviel?region=eu-west-3&amp;tab=objects" xlink:type="simple"> S3 (AWS)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7" draw:text-style-name="P7" draw:layer="layout" svg:width="25.402cm" svg:height="0.999cm" svg:x="-0.002cm" svg:y="13.262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4" draw:style-name="gr5" draw:text-style-name="P2" draw:layer="layout" svg:width="23.484cm" svg:height="0.999cm" svg:x="1.015cm" svg:y="13.262cm">
          <text:p text:style-name="P3"><text:span text:style-name="T9">Jedha - Certification AIA - Bloc 3 - 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3f0fa6fd511_0_75:notes" draw:style-name="gr6" draw:layer="layout" svg:width="16.932cm" svg:height="9.524cm" svg:x="1.059cm" svg:y="1.905cm" draw:page-number="12" presentation:class="page"/>
          <draw:frame draw:name="Google Shape;151;g3f0fa6fd511_0_7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62;p25" draw:style-name="gr1" draw:text-style-name="P2" draw:layer="layout" svg:width="15.53cm" svg:height="2.751cm" svg:x="1cm" svg:y="0.536cm">
          <text:p text:style-name="P3"><text:span text:style-name="T1">Jedha - Data Science Lead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1" draw:text-style-name="P2" draw:layer="layout" svg:width="23.499cm" svg:height="1.185cm" svg:x="1cm" svg:y="1.922cm">
          <text:p text:style-name="P3"><text:span text:style-name="T3"><text:s/></text:span><text:span text:style-name="T3">Certification AIA (Architecte 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5" draw:style-name="gr2" draw:text-style-name="P4" draw:layer="layout" svg:width="1.602cm" svg:height="1.09cm" svg:x="22.898cm" svg:y="1cm">
          <draw:image xlink:href="Pictures/100002010000008D000000609DFC021226D1E325.png" xlink:type="simple" xlink:show="embed" xlink:actuate="onLoad">
            <text:p/>
          </draw:image>
        </draw:frame>
        <draw:custom-shape draw:name="Google Shape;165;p25" draw:style-name="gr3" draw:text-style-name="P4" draw:layer="layout" svg:width="23.496cm" svg:height="0.001cm" svg:x="1.015cm" svg:y="3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5" draw:style-name="gr5" draw:text-style-name="P2" draw:layer="layout" svg:width="23.689cm" svg:height="0.716cm" svg:x="0.81cm" svg:y="13.178cm">
          <text:p text:style-name="P3"><text:span text:style-name="T5">Guillaume VIEL - 16 juillet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5" draw:style-name="gr1" draw:text-style-name="P2" draw:layer="layout" svg:width="23.499cm" svg:height="1.778cm" svg:x="0.81cm" svg:y="5.622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3f0fa6fd511_0_8:notes" draw:style-name="gr6" draw:layer="layout" svg:width="16.932cm" svg:height="9.524cm" svg:x="1.059cm" svg:y="1.905cm" draw:page-number="13" presentation:class="page"/>
          <draw:frame draw:name="Google Shape;160;g3f0fa6fd511_0_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6.0.5.2$Linux_X86_64 LibreOffice_project/</meta:generator>
  </office:meta>
</office:document-meta>
</file>